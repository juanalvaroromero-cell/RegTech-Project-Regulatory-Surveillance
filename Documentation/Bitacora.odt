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Heading_20_3">
      <style:paragraph-properties fo:margin-left="0cm" fo:margin-right="0cm" fo:text-indent="0cm" style:auto-text-indent="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Heading_20_4">
      <style:paragraph-properties fo:margin-left="0cm" fo:margin-right="0cm" fo:margin-top="0.423cm" fo:margin-bottom="0.212cm" fo:text-indent="0cm" style:auto-text-indent="false" fo:break-before="page" fo:keep-with-next="always"/>
      <style:text-properties fo:font-size="18pt" style:text-underline-style="solid" style:text-underline-width="auto" style:text-underline-color="font-color" style:font-size-asian="18pt" style:font-size-complex="18pt"/>
    </style:style>
    <style:style style:name="P5" style:family="paragraph" style:parent-style-name="Text_20_body">
      <style:paragraph-properties fo:margin-top="0cm" fo:margin-bottom="0.212cm" fo:line-height="114%"/>
      <style:text-properties style:font-name="Google Sans Text"/>
    </style:style>
    <style:style style:name="P6" style:family="paragraph" style:parent-style-name="Text_20_body">
      <style:paragraph-properties fo:margin-top="0cm" fo:margin-bottom="0.212cm" fo:line-height="114%"/>
      <style:text-properties style:font-name="Google Sans Text" fo:font-weight="bold"/>
    </style:style>
    <style:style style:name="P7" style:family="paragraph" style:parent-style-name="Standard">
      <style:paragraph-properties fo:margin-left="0cm" fo:margin-right="0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Heading_20_3">
      <style:paragraph-properties fo:margin-left="0cm" fo:margin-right="0cm" fo:margin-top="0.423cm" fo:margin-bottom="0.212cm" fo:text-indent="0cm" style:auto-text-indent="false" fo:keep-with-next="always"/>
    </style:style>
    <style:style style:name="P9" style:family="paragraph" style:parent-style-name="Heading_20_3">
      <style:paragraph-properties fo:margin-left="0cm" fo:margin-right="0cm" fo:margin-top="0.423cm" fo:margin-bottom="0.212cm" fo:text-indent="0cm" style:auto-text-indent="false" fo:keep-with-next="always"/>
      <style:text-properties fo:font-size="18pt" style:text-underline-style="solid" style:text-underline-width="auto" style:text-underline-color="font-color" style:font-size-asian="18pt" style:font-size-complex="18pt"/>
    </style:style>
    <style:style style:name="P10" style:family="paragraph" style:parent-style-name="Heading_20_3">
      <style:paragraph-properties fo:margin-left="0cm" fo:margin-right="0cm" fo:text-indent="0cm" style:auto-text-indent="false"/>
    </style:style>
    <style:style style:name="P11" style:family="paragraph" style:parent-style-name="Heading_20_3">
      <style:text-properties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Heading_20_3" style:master-page-name="">
      <style:paragraph-properties fo:text-align="center" style:justify-single-word="false" style:page-number="auto"/>
      <style:text-properties fo:font-size="20pt" style:text-underline-style="solid" style:text-underline-width="auto" style:text-underline-color="font-color" style:font-size-asian="20pt" style:font-size-complex="20pt"/>
    </style:style>
    <style:style style:name="P13" style:family="paragraph" style:parent-style-name="Heading_20_4">
      <style:paragraph-properties fo:margin-left="0cm" fo:margin-right="0cm" fo:text-align="center" style:justify-single-word="false" fo:text-indent="0cm" style:auto-text-indent="false" fo:break-before="page"/>
      <style:text-properties fo:font-size="20pt" style:text-underline-style="solid" style:text-underline-width="auto" style:text-underline-color="font-color" style:font-size-asian="20pt" style:font-size-complex="20pt"/>
    </style:style>
    <style:style style:name="P14" style:family="paragraph" style:parent-style-name="Heading_20_4">
      <style:paragraph-properties fo:margin-left="0cm" fo:margin-right="0cm" fo:text-indent="0cm" style:auto-text-indent="false"/>
    </style:style>
    <style:style style:name="P15" style:family="paragraph" style:parent-style-name="Heading_20_4">
      <style:paragraph-properties fo:margin-left="0cm" fo:margin-right="0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6" style:family="paragraph" style:parent-style-name="Heading_20_4">
      <style:paragraph-properties fo:margin-left="0cm" fo:margin-right="0cm" fo:margin-top="0.423cm" fo:margin-bottom="0.212cm" fo:text-indent="0cm" style:auto-text-indent="false" fo:keep-with-next="always"/>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22"/>
    <style:style style:name="P25" style:family="paragraph" style:parent-style-name="Text_20_body" style:list-style-name="L24"/>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5">
      <style:text-properties fo:font-style="italic"/>
    </style:style>
    <style:style style:name="P37" style:family="paragraph" style:parent-style-name="Text_20_body" style:list-style-name="L36">
      <style:text-properties fo:font-style="italic"/>
    </style:style>
    <style:style style:name="P38" style:family="paragraph" style:parent-style-name="Text_20_body" style:list-style-name="L37">
      <style:text-properties fo:font-style="italic"/>
    </style:style>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text-properties fo:font-weight="bold"/>
    </style:style>
    <style:style style:name="P42" style:family="paragraph" style:parent-style-name="Text_20_body" style:list-style-name="L38"/>
    <style:style style:name="P43" style:family="paragraph" style:parent-style-name="Text_20_body" style:list-style-name="L39">
      <style:text-properties style:text-underline-style="none" fo:background-color="#ffff00"/>
    </style:style>
    <style:style style:name="P44" style:family="paragraph" style:parent-style-name="Text_20_body" style:list-style-name="L18">
      <style:paragraph-properties fo:margin-top="0cm" fo:margin-bottom="0.212cm" fo:line-height="114%"/>
      <style:text-properties style:font-name="Google Sans Text"/>
    </style:style>
    <style:style style:name="P45" style:family="paragraph" style:parent-style-name="Text_20_body" style:list-style-name="L19">
      <style:paragraph-properties fo:margin-top="0cm" fo:margin-bottom="0.212cm" fo:line-height="114%"/>
      <style:text-properties style:font-name="Google Sans Text"/>
    </style:style>
    <style:style style:name="P46" style:family="paragraph" style:parent-style-name="Text_20_body" style:list-style-name="L20">
      <style:paragraph-properties fo:margin-top="0cm" fo:margin-bottom="0.212cm" fo:line-height="114%"/>
      <style:text-properties style:font-name="Google Sans Text"/>
    </style:style>
    <style:style style:name="P47" style:family="paragraph" style:parent-style-name="Text_20_body" style:list-style-name="L20">
      <style:paragraph-properties fo:margin-top="0cm" fo:margin-bottom="0.212cm" fo:line-height="114%"/>
    </style:style>
    <style:style style:name="P48" style:family="paragraph" style:parent-style-name="Text_20_body">
      <style:paragraph-properties fo:margin-left="0cm" fo:margin-right="0cm" fo:margin-top="0.423cm" fo:margin-bottom="0.212cm" fo:text-indent="0cm" style:auto-text-indent="false"/>
      <style:text-properties fo:font-size="18pt" style:text-underline-style="solid" style:text-underline-width="auto" style:text-underline-color="font-color" style:font-size-asian="18pt" style:font-size-complex="18pt"/>
    </style:style>
    <style:style style:name="P49" style:family="paragraph" style:parent-style-name="Text_20_body">
      <style:paragraph-properties fo:margin-left="0cm" fo:margin-right="0cm" fo:text-indent="0cm" style:auto-text-indent="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size="18pt" style:text-underline-style="solid" style:text-underline-width="auto" style:text-underline-color="font-color" style:font-size-asian="18pt" style:font-size-complex="18pt"/>
    </style:style>
    <style:style style:name="T5"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6pt" style:text-underline-style="solid" style:text-underline-width="auto" style:text-underline-color="font-color" fo:font-weight="bold" style:font-size-asian="16pt" style:font-size-complex="16pt"/>
    </style:style>
    <style:style style:name="T8" style:family="text">
      <style:text-properties style:font-name="Google Sans" fo:font-size="18pt" style:text-underline-style="solid" style:text-underline-width="auto" style:text-underline-color="font-color" fo:font-weight="bold" style:font-size-asian="18pt" style:font-weight-asian="bold" style:font-size-complex="18pt" style:font-weight-complex="bold"/>
    </style:style>
    <style:style style:name="T9" style:family="text">
      <style:text-properties style:font-name="Google Sans Text"/>
    </style:style>
    <style:style style:name="T10" style:family="text">
      <style:text-properties style:font-name="Google Sans Text"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BITACORA – REG TECH PLATFORM PROJECT</text:h>
      <text:h text:style-name="P11" text:outline-level="3">Inicial Project Summary: RegTech Platform for Regulatory Surveillance</text:h>
      <text:p text:style-name="Text_20_body">The project consists of developing an intelligent Regulatory Technology (RegTech) platform designed to automate regulatory surveillance in the pharmaceutical sector. The system will periodically extract information from the EMA (in English) and AEMPS (in Spanish) agencies, storing a historical record of the publications.</text:p>
      <text:p text:style-name="Text_20_body"/>
      <text:p text:style-name="Text_20_body">Using Natural Language Processing (NLP) techniques, the engine will compare the historical data to detect and isolate exclusively the actual regulatory changes, discarding irrelevant website modifications. Subsequently, Generative Artificial Intelligence will translate, unify, and summarize these changes into an executive report in Spanish. Finally, the platform will distribute these alerts via email to segmented user groups. The entire ecosystem will be orchestrated through a web interface, from which recipients can be managed and custom regulatory reports filtered by dates can be requested on demand.</text:p>
      <text:p text:style-name="Text_20_body"/>
      <text:h text:style-name="Heading_20_3" text:outline-level="3">Task and Technology List (End-to-End Pipeline)</text:h>
      <text:p text:style-name="Text_20_body"/>
      <text:p text:style-name="Text_20_body">To build a robust, modular, and fault-tolerant architecture, we will tackle the project covering the following 7 key points:</text:p>
      <text:h text:style-name="Heading_20_4" text:outline-level="4">1. Data Ingestion and Extraction (Data Collection)</text:h>
      <text:list xml:id="list1816458460320752810" text:style-name="L8">
        <text:list-item>
          <text:p text:style-name="P17"><text:span text:style-name="T3">Explanation:</text:span> Creation of the modules responsible for visiting the EMA and AEMPS websites to extract regulatory texts. It will be designed with an object-oriented approach, creating independent extractors for each agency that handle exceptions and network failures gracefully.</text:p>
        </text:list-item>
        <text:list-item>
          <text:p text:style-name="P17"><text:span text:style-name="T3">Technologies:</text:span> <text:span text:style-name="Source_20_Text">Python</text:span>, scraping libraries like <text:span text:style-name="Source_20_Text">BeautifulSoup</text:span> or <text:span text:style-name="Source_20_Text">Scrapy</text:span>, and <text:span text:style-name="Source_20_Text">Requests</text:span>.</text:p>
          <text:p text:style-name="P17"/>
        </text:list-item>
      </text:list>
      <text:h text:style-name="Heading_20_4" text:outline-level="4">2. Historical Storage and Versioning (Database)</text:h>
      <text:list xml:id="list9142995420394952045" text:style-name="L9">
        <text:list-item>
          <text:p text:style-name="P18"><text:span text:style-name="T3">Explanation:</text:span> Design of a centralized repository to store the raw extracted texts along with their metadata (agency, extraction date, link). This layer will ensure the temporal traceability needed to compare the "before" and "after" in on-demand queries.</text:p>
        </text:list-item>
        <text:list-item>
          <text:p text:style-name="P18"><text:span text:style-name="T3">Technologies:</text:span> Document databases like <text:span text:style-name="Source_20_Text">MongoDB</text:span> (ideal for unstructured text) or relational databases like <text:span text:style-name="Source_20_Text">PostgreSQL</text:span> using an ORM like <text:span text:style-name="Source_20_Text">SQLAlchemy</text:span>.</text:p>
          <text:p text:style-name="P18"/>
        </text:list-item>
      </text:list>
      <text:h text:style-name="Heading_20_4" text:outline-level="4">3. Change Detection Engine (NLP / Machine Learning)</text:h>
      <text:list xml:id="list42698727177768320" text:style-name="L10">
        <text:list-item>
          <text:p text:style-name="P19"><text:span text:style-name="T3">Explanation:</text:span> Instead of performing an exact text comparison (which would fail if a simple period or comma changes), paragraphs will be transformed into numerical vectors. By calculating the mathematical distance between last month's text and the current one, the model will detect if there has been a real change in meaning in the regulation, isolating only the important fragments.</text:p>
        </text:list-item>
        <text:list-item>
          <text:p text:style-name="P19"><text:span text:style-name="T3">Technologies:</text:span> Lightweight Transformer models (<text:span text:style-name="T1">Sentence Transformers</text:span>), libraries like <text:span text:style-name="Source_20_Text">HuggingFace</text:span>, <text:span text:style-name="Source_20_Text">PyTorch</text:span>, or <text:span text:style-name="Source_20_Text">Scikit-learn</text:span> to calculate Cosine Similarity.</text:p>
          <text:p text:style-name="P19"/>
        </text:list-item>
      </text:list>
      <text:h text:style-name="Heading_20_4" text:outline-level="4"><text:soft-page-break/>4. Synthesis and Translation (Generative AI)</text:h>
      <text:list xml:id="list4923938908611335094" text:style-name="L11">
        <text:list-item>
          <text:p text:style-name="P20"><text:span text:style-name="T3">Explanation:</text:span> Processing of the regulatory fragments isolated in the previous step. Structured system prompts will be designed so the LLM acts as a regulatory analyst, receives texts in English (EMA) or Spanish (AEMPS), and always returns a standardized executive summary in Spanish, organized in bullet points.</text:p>
        </text:list-item>
        <text:list-item>
          <text:p text:style-name="P20"><text:span text:style-name="T3">Technologies:</text:span> LLM APIs (such as <text:span text:style-name="Source_20_Text">OpenAI API</text:span> or <text:span text:style-name="Source_20_Text">Anthropic</text:span>), orchestration frameworks like <text:span text:style-name="Source_20_Text">LangChain</text:span> to handle call chains and context injection.</text:p>
        </text:list-item>
      </text:list>
      <text:p text:style-name="Text_20_body"/>
      <text:h text:style-name="Heading_20_4" text:outline-level="4">5. Backend Development and Business Logic (API)</text:h>
      <text:list xml:id="list466866232339992047" text:style-name="L12">
        <text:list-item>
          <text:p text:style-name="P21"><text:span text:style-name="T3">Explanation:</text:span> Construction of the core engine that connects the database, NLP models, and the LLM. This is where the endpoints that will execute on-demand reports and manage the CRUD (Create, Read, Update, Delete) operations of the user database are defined. Solid data validation and unit testing strategies will be applied to guarantee service stability.</text:p>
        </text:list-item>
        <text:list-item>
          <text:p text:style-name="P21"><text:span text:style-name="T3">Technologies:</text:span> <text:span text:style-name="Source_20_Text">FastAPI</text:span> (for its extremely high performance and automatic documentation), <text:span text:style-name="Source_20_Text">Pydantic</text:span> (data schema validation), <text:span text:style-name="Source_20_Text">Pytest</text:span> (for test automation).</text:p>
          <text:p text:style-name="P21"/>
        </text:list-item>
      </text:list>
      <text:h text:style-name="Heading_20_4" text:outline-level="4">6. Management Interface and Frontend (UI)</text:h>
      <text:list xml:id="list1580498596190962007" text:style-name="L13">
        <text:list-item>
          <text:p text:style-name="P22"><text:span text:style-name="T3">Explanation:</text:span> Creation of the visual control panel. It will have two main sections: a manager to add or remove emails from the distribution groups, and an analytical dashboard with date and agency selectors so a user can instantly generate custom regulatory reports.</text:p>
        </text:list-item>
        <text:list-item>
          <text:p text:style-name="P22"><text:span text:style-name="T3">Technologies:</text:span> <text:span text:style-name="Source_20_Text">Streamlit</text:span> or <text:span text:style-name="Source_20_Text">Gradio</text:span> (they allow building professional data interfaces directly in Python with great agility).</text:p>
          <text:p text:style-name="P22"/>
        </text:list-item>
      </text:list>
      <text:h text:style-name="Heading_20_4" text:outline-level="4">7. Automation and Notification System (Distribution)</text:h>
      <text:list xml:id="list1666312241903279728" text:style-name="L14">
        <text:list-item>
          <text:p text:style-name="P23"><text:span text:style-name="T3">Explanation:</text:span> Implementation of the email delivery system and the scheduling of automated tasks. It ensures that the workflow of extraction, analysis, and mass emailing runs strictly on a biweekly or monthly basis without human intervention.</text:p>
        </text:list-item>
        <text:list-item>
          <text:p text:style-name="P23"><text:span text:style-name="T3">Technologies:</text:span> Python's native <text:span text:style-name="Source_20_Text">smtplib</text:span> library (or transactional services like SendGrid), and task schedulers like <text:span text:style-name="Source_20_Text">Cron</text:span> (Linux), <text:span text:style-name="Source_20_Text">Celery</text:span>, or <text:span text:style-name="Source_20_Text">APScheduler</text:span>.</text:p>
        </text:list-item>
      </text:list>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3"><text:soft-page-break/><text:span text:style-name="T8">Testing Strategy and Validation Scenarios</text:span></text:h>
      <text:p text:style-name="P6">Scenario 1: Baseline (The Control)</text:p>
      <text:list xml:id="list4578718374411647426" text:style-name="L18">
        <text:list-item>
          <text:p text:style-name="P44"><text:span text:style-name="T3">The Text:</text:span> A real, current communication extracted from the EMA website.</text:p>
        </text:list-item>
        <text:list-item>
          <text:p text:style-name="P44"><text:span text:style-name="T3">The Objective:</text:span> To serve as the ground truth. The system processes this text and stores it in the database as the reference version.</text:p>
        </text:list-item>
      </text:list>
      <text:p text:style-name="P6">Scenario 2: "Easy" Level (Happy Path)</text:p>
      <text:p text:style-name="P5">Here we demonstrate that the base code works and delivers on its promise without breaking. Into the text from Scenario 1, we inject the following:</text:p>
      <text:list xml:id="list8510264225372357809" text:style-name="L19">
        <text:list-item>
          <text:p text:style-name="P45"><text:span text:style-name="T3">Irrelevant Change (Visual Noise):</text:span> We change double spaces, convert a word to uppercase, or correct a spelling mistake (e.g., changing "aplication" to "application"). The similarity model (embeddings) must ignore this.</text:p>
        </text:list-item>
        <text:list-item>
          <text:p text:style-name="P45"><text:span text:style-name="T3">Small Relevant Change (Key Data):</text:span> We change an obvious figure. For example, where it said "a 30-day period", we change it to "a 90-day period".</text:p>
        </text:list-item>
        <text:list-item>
          <text:p text:style-name="P45"><text:span text:style-name="T3">Large Relevant Change (Obvious Structure):</text:span> We add a completely new block of text at the end of the document with a clear title: <text:span text:style-name="T1">"NEW ANNEX: Prohibited Substances"</text:span>.</text:p>
        </text:list-item>
      </text:list>
      <text:p text:style-name="P6">Scenario 3: "Hard" Level (Stress Test / Edge Cases)</text:p>
      <text:p text:style-name="P5">This is where the project proves its advanced capabilities. We demonstrate that the system understands semantics and legal context, rather than just basic word matching.</text:p>
      <text:list xml:id="list9180080547895453561" text:style-name="L20">
        <text:list-item>
          <text:p text:style-name="P46"><text:span text:style-name="T3">Irrelevant Change (Semantic Trap):</text:span> We rewrite an entire paragraph by changing the passive voice to active voice and using synonyms, while maintaining the exact same meaning. (e.g., <text:span text:style-name="T1">"The drug was approved by the committee"</text:span> $\rightarrow$ <text:span text:style-name="T1">"The committee granted approval for the medication"</text:span>). The NLP system must be smart enough to recognize that the mathematical distance is negligible and discard it, preventing it from reaching the final email.</text:p>
        </text:list-item>
        <text:list-item>
          <text:p text:style-name="P46"><text:span text:style-name="T3">Small Relevant Change (Critical Legal Subtlety):</text:span> We change a single modal verb that alters the entire weight of the regulation. For example, changing <text:span text:style-name="T1">"Companies </text:span><text:span text:style-name="T2">may</text:span><text:span text:style-name="T1"> submit the report"</text:span> to <text:span text:style-name="T1">"Companies </text:span><text:span text:style-name="T2">must</text:span><text:span text:style-name="T1"> submit the report"</text:span>. At the text level, it is a one-word change. At the semantic and legal level, it is a red alert that the system must catch.</text:p>
        </text:list-item>
        <text:list-item>
          <text:p text:style-name="P46"><text:span text:style-name="T3">Large Relevant Change (Injected Contradiction):</text:span> We insert a paragraph in the middle of the original text that revokes a previous authorization. This will force the final LLM not only to extract the change but also to synthesize the concept of a "revocation" in its email summary.</text:p>
        </text:list-item>
        <text:list-item>
          <text:p text:style-name="P47"><text:span text:style-name="T10">Large Relevant Change (Paragraph Deletion):</text:span><text:span text:style-name="T9"> We removed an entire paragraph. This will force the final LLM to detect a significant change.</text:span></text:p>
        </text:list-item>
      </text:list>
      <text:p text:style-name="P2"/>
      <text:p text:style-name="P2"/>
      <text:p text:style-name="P2"/>
      <text:p text:style-name="P2"/>
      <text:p text:style-name="P2"/>
      <text:p text:style-name="P2"/>
      <text:p text:style-name="P2"/>
      <text:h text:style-name="P13" text:outline-level="4">Final Version</text:h>
      <text:h text:style-name="Heading_20_4" text:outline-level="4"><text:s/><text:span text:style-name="T4">STEP 1 - Scalability of the Ingestion Module</text:span></text:h>
      <text:list xml:id="list7678744601911265506" text:style-name="L22">
        <text:list-item>
          <text:p text:style-name="P24"><text:span text:style-name="T3">Technical Objective:</text:span> To refactor the baseline extraction script to process multiple regulatory sections sequentially and automatically, laying the groundwork for a large-scale monitoring system.</text:p>
        </text:list-item>
        <text:list-item>
          <text:p text:style-name="P24"><text:span text:style-name="T3">Optimization and Best Practices (Polite Scraping):</text:span> When iterating over a list of URLs, there is a high risk that the government server will classify simultaneous requests as an attack (DDoS) or a malicious bot, returning a 403 (Forbidden) or 503 (Service Unavailable) error. To prevent this ban, a structured loop utilizing dictionaries to assign dynamic output filenames has been implemented, combined with a scheduled delay (<text:span text:style-name="Source_20_Text">time.sleep</text:span>) between iterations. This simulates human browsing behavior, protecting the execution environment's IP and ensuring the stability of the data pipeline in production.</text:p>
        </text:list-item>
      </text:list>
      <text:p text:style-name="P2"/>
      <text:h text:style-name="P16" text:outline-level="4"><text:s/><text:span text:style-name="T4">STEP 2 - Historical Storage and Versioning</text:span></text:h>
      <text:list xml:id="list6581551303573939799" text:style-name="L24">
        <text:list-item>
          <text:p text:style-name="P25"><text:span text:style-name="T3">Technical Objective:</text:span> To design and implement a centralized, persistent repository to store the raw texts extracted during the ingestion phase, providing the system with the temporal traceability required to execute on-demand regulatory comparisons ("before" vs. "after").</text:p>
        </text:list-item>
        <text:list-item>
          <text:p text:style-name="P25"><text:span text:style-name="T3">Architectural Decision:</text:span> A relational database approach was chosen, implemented via <text:span text:style-name="T3">SQLite</text:span> and managed through the <text:span text:style-name="T3">SQLAlchemy</text:span> ORM in Python. For an agile development environment and an MVP (Minimum Viable Product), this setup provides all the robustness, type safety, and structured querying capabilities (SQL) of heavy-duty systems like PostgreSQL, but without the operational overhead of spinning up and managing local servers or containers.</text:p>
        </text:list-item>
        <text:list-item>
          <text:p text:style-name="P25"><text:span text:style-name="T3">Data Structure (Schema):</text:span> The <text:span text:style-name="Source_20_Text">RegulatorySnapshot</text:span> entity was designed to store critical metadata such as the agency identifier (e.g., EMA), the source URL, and an auto-generated timestamp (<text:span text:style-name="Source_20_Text">extraction_date</text:span>) at the time of ingestion. The heavy regulatory text and the JSON/String structure of the tracked links are stored in <text:span text:style-name="Source_20_Text">Text</text:span> data type columns, ensuring no data loss due to character limits.</text:p>
        </text:list-item>
      </text:list>
      <text:p text:style-name="P2"/>
      <text:h text:style-name="P8" text:outline-level="3"><text:span text:style-name="T4">STEP 3 - Hybrid NLP Change Detection Engine</text:span></text:h>
      <text:p text:style-name="Text_20_body"><text:span text:style-name="T3">Objective:</text:span> Implement an intelligent comparison engine capable of distinguishing between superficial rephrasing (semantic traps) and critical regulatory modifications, avoiding both false positives and false negatives. <text:span text:style-name="T3">Key Implementations:</text:span></text:p>
      <text:list xml:id="list7276590369323392747" text:style-name="L26">
        <text:list-item>
          <text:p text:style-name="P26"><text:span text:style-name="T3">Vectorial Semantic Analysis:</text:span> Replaced basic string matching with <text:span text:style-name="Source_20_Text">SentenceTransformers</text:span> (<text:span text:style-name="Source_20_Text">all-MiniLM-L6-v2</text:span>) to compute cosine similarity matrices between all old and new paragraphs, evaluating true meaning rather than exact characters.</text:p>
        </text:list-item>
        <text:list-item>
          <text:p text:style-name="P26"><text:span text:style-name="T3">Greedy Matching Algorithm:</text:span> Designed an exclusive assignment system (1-to-1 paragraph mapping) to prevent "shadow matching." This guarantees the accurate identification of completely deleted texts (DELETED) that share terminology with other paragraphs.</text:p>
        </text:list-item>
        <text:list-item>
          <text:p text:style-name="P26"><text:span text:style-name="T3">Hybrid Decision Tree:</text:span> Combined semantic similarity scores with targeted Regular Expressions (<text:span text:style-name="Source_20_Text">Regex</text:span>) to enforce strict business rules. This successfully flags critical changes in legal modalities (e.g., changing "may" to "must") and critical dates/numbers.</text:p>
        </text:list-item>
        <text:list-item>
          <text:p text:style-name="P26"><text:span text:style-name="T3">Semantic Trap Discarding:</text:span> Implemented a length-ratio validation threshold to silently ignore extensive paraphrasing or active/passive voice changes. This ensures the system filters out structural noise and only escalates genuine regulatory shifts to the LLM.</text:p>
        </text:list-item>
      </text:list>
      <text:h text:style-name="P9" text:outline-level="3"><text:soft-page-break/><text:span text:style-name="T3">STEP 4: Generative AI &amp; Executive Reporting (LLM Integration)</text:span></text:h>
      <text:p text:style-name="Text_20_body"><text:span text:style-name="T3">Objective:</text:span> Transform raw structural changes detected by the NLP engine into a coherent, bilingual executive summary tailored for legal, QA, and compliance professionals. <text:span text:style-name="T3">Key Implementations:</text:span></text:p>
      <text:list xml:id="list6777065945995813737" text:style-name="L28">
        <text:list-item>
          <text:p text:style-name="P28"><text:span text:style-name="T3">LLM Cloud Integration:</text:span> Connected to the Groq API utilizing the Llama 3 model for high-speed, low-latency natural language generation.</text:p>
        </text:list-item>
        <text:list-item>
          <text:p text:style-name="P28"><text:span text:style-name="T3">Contextual Synthesis:</text:span> Engineered a strict prompt that forces the AI to analyze the <text:span text:style-name="T1">impact</text:span> of the change, not just the text difference. The model successfully synthesizes complex scenarios, such as interpreting a legal modality shift ("may" to "must") as a strict obligation and extracting hidden revocations within large paragraphs.</text:p>
        </text:list-item>
        <text:list-item>
          <text:p text:style-name="P28"><text:span text:style-name="T3">Bilingual Output Generation:</text:span> Configured the model to automatically output a structured, bulleted report in both English and Spanish, ensuring accessibility for international teams.</text:p>
        </text:list-item>
        <text:list-item>
          <text:p text:style-name="P28"><text:span text:style-name="T3">Database Persistence:</text:span> Designed the pipeline to save the final generated payload, alongside the alert count and execution timestamp, into the <text:span text:style-name="Source_20_Text">RegulatoryReport</text:span> table in SQLite, making the data permanently available for the Streamlit dashboard and trend analytics.</text:p>
        </text:list-item>
      </text:list>
      <text:p text:style-name="Text_20_body"/>
      <text:p text:style-name="P49"><text:span text:style-name="T3"><text:s/></text:span><text:span text:style-name="T5">STEP 5 – Data Consolidation and Audit Trail Logging</text:span></text:p>
      <text:p text:style-name="Text_20_body"><text:span text:style-name="T3">1. Module Overview</text:span> Step 5 represents the closure of the data lifecycle within the automated surveillance architecture. Its objective is twofold: on the one hand, to synchronize the database so that the text detected in the <text:span text:style-name="T3">current execution cycle</text:span> becomes the new baseline (reference state) for future runs; on the other hand, to immutably log the executive report generated by the AI to guarantee the historical traceability required in compliance audits.</text:p>
      <text:p text:style-name="Text_20_body"><text:span text:style-name="T3">2. Baseline Synchronization and Query Optimization</text:span> To prevent destructive overwriting (where a modified fragment would delete the rest of the legal document) and reduce the computational cost on the database, a deduplication algorithm was designed.</text:p>
      <text:list xml:id="list7053961944274218080" text:style-name="L31">
        <text:list-item>
          <text:p text:style-name="P31"><text:span text:style-name="T3">Unique Extraction:</text:span> The system extracts URLs using a mathematical set (<text:span text:style-name="Source_20_Text">set()</text:span>), filtering out duplicate alerts if the same page underwent multiple alterations.</text:p>
        </text:list-item>
        <text:list-item>
          <text:p text:style-name="P31"><text:span text:style-name="T3">Integral Overwrite:</text:span> The ORM locates the previous record and updates the <text:span text:style-name="Source_20_Text">text_content</text:span> column using the full text dump generated in the previous phases, ensuring that the complete document is ready for the <text:span text:style-name="T3">next surveillance cycle</text:span>.</text:p>
        </text:list-item>
      </text:list>
      <text:p text:style-name="Text_20_body"><text:span text:style-name="T3">3. Transactional Management (ACID) and ORM Security</text:span> Interaction with the relational database is managed entirely through SQLAlchemy. Strict session control (creation, execution, and closure per cycle) backed by a defensive <text:span text:style-name="Source_20_Text">try/except</text:span> block has been implemented.</text:p>
      <text:list xml:id="list3428438653135496989" text:style-name="L32">
        <text:list-item>
          <text:p text:style-name="P32"><text:span text:style-name="T3">Controlled Commit:</text:span> If all baseline updates and the report saving are successful, the transaction is sealed globally.</text:p>
        </text:list-item>
        <text:list-item>
          <text:p text:style-name="P32"><text:span text:style-name="T3">Security Rollback:</text:span> In the event of any network failure or structural integrity error during the loop, the system executes a <text:span text:style-name="Source_20_Text">.rollback()</text:span>, reverting all partial operations to prevent data corruption and maintain the system's pristine state.</text:p>
        </text:list-item>
      </text:list>
      <text:p text:style-name="Text_20_body"><text:span text:style-name="T3">4. Audit Trail Logging</text:span> The bilingual report generated by the Groq Llama-3.1 model is encapsulated in a structured dictionary (including execution date, alert metrics, and the detailed summaries in English and Spanish). This structure lays the foundation for the <text:span text:style-name="Source_20_Text">RegulatoryReport</text:span> data model, allowing the end user to retrieve past reports through chronological queries in the Dashboard.</text:p>
      <text:p text:style-name="P2"/>
      <text:p text:style-name="P2"/>
      <text:p text:style-name="P2"/>
      <text:p text:style-name="P2"/>
      <text:h text:style-name="P14" text:outline-level="4"><text:soft-page-break/><text:span text:style-name="T5">STEP 6: Executive Dashboard &amp; Delivery System</text:span></text:h>
      <text:p text:style-name="Text_20_body"><text:span text:style-name="T3">Objective:</text:span> Build a fully functional, enterprise-grade frontend to visualize AI reports, manage automated email distributions, track historical metrics, and orchestrate the live surveillance pipeline.</text:p>
      <text:p text:style-name="P41">Key Implementations:</text:p>
      <text:list xml:id="list3292376089393495294" text:style-name="L38">
        <text:list-item>
          <text:p text:style-name="P42"><text:span text:style-name="T3">UI/UX Engineering:</text:span> Developed a web interface using <text:span text:style-name="Source_20_Text">Streamlit</text:span>, incorporating custom CSS and HTML injection to achieve a corporate design (custom icons, cohesive color schemes, and animated visual feedback).</text:p>
        </text:list-item>
        <text:list-item>
          <text:p text:style-name="P42"><text:span text:style-name="T3">Live Pipeline Orchestration:</text:span> Transformed the dashboard into an active command center by integrating a direct trigger for the end-to-end RegTech engine (<text:span text:style-name="Source_20_Text">pipeline_runner.py</text:span>). Included a secure confirmation checkpoint (<text:span text:style-name="Source_20_Text">st.popover</text:span>) to prevent accidental executions and manage API consumption.</text:p>
        </text:list-item>
        <text:list-item>
          <text:p text:style-name="P42"><text:span text:style-name="T3">Real-Time Execution Terminal:</text:span> Engineered a streaming console within the UI that reads from a backend Python generator (<text:span text:style-name="Source_20_Text">yield</text:span>). This provides users with synchronous, step-by-step visual feedback of the pipeline's progress (Scraping, DB Validation, NLP Matrix, LLM Synthesis, Consolidation) mimicking a live server terminal.</text:p>
        </text:list-item>
        <text:list-item>
          <text:p text:style-name="P42"><text:span text:style-name="T3">Historical Database Connection:</text:span> Transitioned from mock data to reading real <text:span text:style-name="Source_20_Text">RegulatoryReport</text:span> entries from the SQLAlchemy SQLite database, allowing users to select and review past surveillance cycles.</text:p>
        </text:list-item>
        <text:list-item>
          <text:p text:style-name="P42"><text:span text:style-name="T3">Mailing List Management (CRUD):</text:span> Implemented a JSON-based persistent storage system to create, read, update, and delete distribution groups and email addresses seamlessly from the interface.</text:p>
        </text:list-item>
        <text:list-item>
          <text:p text:style-name="P42"><text:span text:style-name="T3">PDF Report Generation:</text:span> Integrated <text:span text:style-name="Source_20_Text">reportlab</text:span> to compile bilingual regulatory alerts into a formatted, downloadable PDF document on the fly, injecting custom metadata and corporate headers.</text:p>
        </text:list-item>
        <text:list-item>
          <text:p text:style-name="P42"><text:span text:style-name="T3">SMTP Email Engine:</text:span> Built an automated delivery system using <text:span text:style-name="Source_20_Text">smtplib</text:span> and MIME protocols to send HTML-formatted emails (with embedded logos and optional PDF attachments) securely via Google's App Passwords.</text:p>
        </text:list-item>
        <text:list-item>
          <text:p text:style-name="P42"><text:span text:style-name="T3">Trend Analytics:</text:span> Deployed a data visualization tab utilizing <text:span text:style-name="Source_20_Text">pandas</text:span> to plot historical alert volumes over time, enabling compliance officers to track regulatory activity spikes.</text:p>
        </text:list-item>
      </text:list>
      <text:p text:style-name="P49"><text:span text:style-name="T5"/></text:p>
      <text:p text:style-name="P2"/>
      <text:h text:style-name="P15" text:outline-level="4">STEP 7: Automation and Notification System (Distribution)</text:h>
      <text:list xml:id="list6632243384828439634" text:style-name="L39">
        <text:list-item>
          <text:p text:style-name="P43"><text:span text:style-name="T6">Pending review and creation for the commercial vers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42cm" fo:margin-bottom="0.893cm" fo:margin-left="1.058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5-21T12:55:30.58</meta:creation-date>
    <dc:date>2026-05-29T08:47:44.30</dc:date>
    <meta:editing-duration>P1DT23H3M50S</meta:editing-duration>
    <meta:editing-cycles>14</meta:editing-cycles>
    <meta:generator>OpenOffice/4.1.16$Win32 OpenOffice.org_project/4116m3$Build-9816</meta:generator>
    <meta:document-statistic meta:table-count="0" meta:image-count="0" meta:object-count="0" meta:page-count="6" meta:paragraph-count="84" meta:word-count="2281" meta:character-count="15748"/>
  </office:meta>
</office:document-meta>
</file>